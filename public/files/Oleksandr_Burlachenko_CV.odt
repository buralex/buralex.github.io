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0.6861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0.6861in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1in" style:rel-column-width="32753*"/>
    </style:style>
    <style:style style:name="Table2.B" style:family="table-column">
      <style:table-column-properties style:column-width="3.3479in" style:rel-column-width="32782*"/>
    </style:style>
    <style:style style:name="Table2.1" style:family="table-row">
      <style:table-row-properties style:min-row-height="0.35in"/>
    </style:style>
    <style:style style:name="Table2.A1" style:family="table-cell">
      <style:table-cell-properties fo:padding="0.0382in" fo:border-left="none" fo:border-right="none" fo:border-top="0.5pt solid #999999" fo:border-bottom="0.5pt solid #999999"/>
    </style:style>
    <style:style style:name="Table2.2" style:family="table-row">
      <style:table-row-properties style:min-row-height="0.441in"/>
    </style:style>
    <style:style style:name="Table2.A2" style:family="table-cell">
      <style:table-cell-properties fo:padding="0.0382in" fo:border-left="none" fo:border-right="none" fo:border-top="0.5pt solid #999999" fo:border-bottom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5in"/>
    </style:style>
    <style:style style:name="Table3.A1" style:family="table-cell">
      <style:table-cell-properties fo:padding="0.0382in" fo:border-left="none" fo:border-right="none" fo:border-top="0.5pt solid #999999" fo:border-bottom="0.5pt solid #999999"/>
    </style:style>
    <style:style style:name="Table3.2" style:family="table-row">
      <style:table-row-properties style:min-row-height="0.5076in"/>
    </style:style>
    <style:style style:name="Table3.A2" style:family="table-cell">
      <style:table-cell-properties fo:padding="0.0382in" fo:border-left="none" fo:border-right="none" fo:border-top="0.5pt solid #999999" fo:border-bottom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58in" style:rel-column-width="32760*"/>
    </style:style>
    <style:style style:name="Table4.B" style:family="table-column">
      <style:table-column-properties style:column-width="3.3472in" style:rel-column-width="32775*"/>
    </style:style>
    <style:style style:name="Table4.1" style:family="table-row">
      <style:table-row-properties style:min-row-height="0.35in"/>
    </style:style>
    <style:style style:name="Table4.A1" style:family="table-cell">
      <style:table-cell-properties fo:padding="0.0382in" fo:border-left="none" fo:border-right="none" fo:border-top="0.5pt solid #999999" fo:border-bottom="0.5pt solid #999999"/>
    </style:style>
    <style:style style:name="Table4.A2" style:family="table-cell">
      <style:table-cell-properties fo:padding="0.0382in" fo:border-left="none" fo:border-right="none" fo:border-top="0.5pt solid #999999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normal" officeooo:rsid="00027a14" officeooo:paragraph-rsid="00027a1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4c560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normal" officeooo:rsid="00399b17" officeooo:paragraph-rsid="00399b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399b17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399b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210f00" style:font-size-asian="10pt" style:font-size-complex="10pt"/>
    </style:style>
    <style:style style:name="P8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3d83af" style:font-size-asian="10pt" style:font-size-complex="10pt"/>
    </style:style>
    <style:style style:name="P9" style:family="paragraph" style:parent-style-name="Standard">
      <style:paragraph-properties fo:text-align="left" style:justify-single-word="false"/>
      <style:text-properties style:font-name="Arial" officeooo:paragraph-rsid="00210f00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7e72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0adcf7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0adcf7" style:font-size-asian="8.75pt" style:font-weight-asian="normal" style:font-size-complex="10pt" style:font-weight-complex="normal"/>
    </style:style>
    <style:style style:name="P13" style:family="paragraph" style:parent-style-name="Table_20_Contents">
      <style:paragraph-properties fo:text-align="righ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287b0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287b0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Arial" fo:font-size="10pt" fo:font-weight="normal" officeooo:rsid="00210f00" officeooo:paragraph-rsid="00329e4a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29e4a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29e4a" style:font-size-asian="8.75pt" style:font-weight-asian="normal" style:font-size-complex="10pt" style:font-weight-complex="normal"/>
    </style:style>
    <style:style style:name="P19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1158be" style:font-size-asian="8.75pt" style:font-weight-asian="bold" style:font-size-complex="10pt" style:font-weight-complex="bold"/>
    </style:style>
    <style:style style:name="P20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1158be" style:font-size-asian="8.75pt" style:font-weight-asian="normal" style:font-size-complex="10pt" style:font-weight-complex="normal"/>
    </style:style>
    <style:style style:name="P21" style:family="paragraph" style:parent-style-name="Table_20_Contents">
      <style:paragraph-properties fo:text-align="right" style:justify-single-word="false"/>
      <style:text-properties style:font-name="Arial" fo:font-size="10pt" fo:font-weight="bold" officeooo:rsid="000adcf7" officeooo:paragraph-rsid="0024b356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45f8e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45f8e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1f6a34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26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rsid="0037cd21" officeooo:paragraph-rsid="0037cd21"/>
    </style:style>
    <style:style style:name="P29" style:family="paragraph" style:parent-style-name="Standard">
      <style:paragraph-properties fo:text-align="left" style:justify-single-word="false"/>
      <style:text-properties fo:color="#333333" loext:opacity="100%" style:font-name="Arial" fo:font-size="10pt" fo:font-weight="normal" officeooo:rsid="000d1b74" officeooo:paragraph-rsid="003ac440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weight="normal" officeooo:rsid="000d1b74" officeooo:paragraph-rsid="000d1b7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left" style:justify-single-word="false"/>
      <style:text-properties style:font-name="Arial" fo:font-size="10pt" fo:font-weight="normal" officeooo:rsid="000d1b74" officeooo:paragraph-rsid="003ac440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left" style:justify-single-word="false"/>
      <style:text-properties style:font-name="Arial" fo:font-size="10pt" fo:font-weight="normal" officeooo:rsid="000d1b74" officeooo:paragraph-rsid="0030b2e1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left" style:justify-single-word="false"/>
      <style:text-properties fo:color="#333333" loext:opacity="100%" style:font-name="Arial" fo:font-size="10pt" fo:font-weight="normal" officeooo:rsid="001158be" officeooo:paragraph-rsid="001efa56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d83af"/>
    </style:style>
    <style:style style:name="T3" style:family="text">
      <style:text-properties officeooo:rsid="003c1254"/>
    </style:style>
    <style:style style:name="T4" style:family="text">
      <style:text-properties fo:font-variant="normal" fo:text-transform="none" fo:color="#000000" loext:opacity="100%" fo:font-family="Raleway" fo:letter-spacing="normal" fo:font-style="normal" fo:font-weight="normal"/>
    </style:style>
    <style:style style:name="T5" style:family="text">
      <style:text-properties fo:font-size="10pt" fo:font-weight="bold" officeooo:rsid="00074b40" style:font-size-asian="10pt" style:font-weight-asian="bold" style:font-size-complex="10pt" style:font-weight-complex="bold"/>
    </style:style>
    <style:style style:name="T6" style:family="text">
      <style:text-properties fo:font-size="10pt" officeooo:rsid="00074b40" style:font-size-asian="10pt" style:font-size-complex="10pt"/>
    </style:style>
    <style:style style:name="T7" style:family="text">
      <style:text-properties fo:font-size="10pt" officeooo:rsid="000adcf7" style:font-size-asian="10pt" style:font-size-complex="10pt"/>
    </style:style>
    <style:style style:name="T8" style:family="text">
      <style:text-properties fo:font-size="10pt" officeooo:rsid="0007e72e" style:font-size-asian="10pt" style:font-size-complex="10pt"/>
    </style:style>
    <style:style style:name="T9" style:family="text">
      <style:text-properties officeooo:rsid="001dd3c9"/>
    </style:style>
    <style:style style:name="T10" style:family="text">
      <style:text-properties officeooo:rsid="003e311d"/>
    </style:style>
    <style:style style:name="T11" style:family="text">
      <style:text-properties officeooo:rsid="001f6a34"/>
    </style:style>
    <style:style style:name="T12" style:family="text">
      <style:text-properties fo:color="#333333" loext:opacity="100%"/>
    </style:style>
    <style:style style:name="T13" style:family="text">
      <style:text-properties fo:color="#000000" loext:opacity="100%" fo:font-weight="normal" officeooo:rsid="000ba2b5" style:font-weight-asian="normal" style:font-weight-complex="normal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font-weight="normal" officeooo:rsid="00116eca" style:font-weight-asian="normal" style:font-weight-complex="normal"/>
    </style:style>
    <style:style style:name="T16" style:family="text">
      <style:text-properties fo:color="#333333" loext:opacity="100%" fo:font-weight="bold" officeooo:rsid="001158be" style:font-weight-asian="bold" style:font-weight-complex="bold"/>
    </style:style>
    <style:style style:name="T17" style:family="text">
      <style:text-properties fo:color="#333333" loext:opacity="100%" fo:font-weight="bold" style:font-weight-asian="bold" style:font-weight-complex="bold"/>
    </style:style>
    <style:style style:name="T18" style:family="text">
      <style:text-properties fo:color="#000000" loext:opacity="100%" officeooo:rsid="00210f00"/>
    </style:style>
    <style:style style:name="T19" style:family="text">
      <style:text-properties fo:color="#000000" loext:opacity="100%" officeooo:rsid="00074b40" style:font-size-asian="10pt"/>
    </style:style>
    <style:style style:name="T20" style:family="text">
      <style:text-properties officeooo:rsid="00210f00"/>
    </style:style>
    <style:style style:name="T21" style:family="text">
      <style:text-properties fo:color="#000000" loext:opacity="100%" fo:font-weight="normal" officeooo:rsid="003287b0" style:font-weight-asian="normal" style:font-weight-complex="normal"/>
    </style:style>
    <style:style style:name="T22" style:family="text">
      <style:text-properties officeooo:rsid="002f10be"/>
    </style:style>
    <style:style style:name="T23" style:family="text">
      <style:text-properties officeooo:rsid="00345f8e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officeooo:rsid="003287b0"/>
    </style:style>
    <style:style style:name="T26" style:family="text">
      <style:text-properties officeooo:rsid="000ba2b5"/>
    </style:style>
    <style:style style:name="T27" style:family="text">
      <style:text-properties officeooo:rsid="00118214"/>
    </style:style>
    <style:style style:name="T28" style:family="text">
      <style:text-properties officeooo:rsid="00074b40" style:font-size-asian="10pt"/>
    </style:style>
    <style:style style:name="T29" style:family="text">
      <style:text-properties style:font-name="Arial" fo:font-size="12pt" fo:font-weight="normal" officeooo:rsid="0030b2e1" style:font-size-asian="10.5pt" style:font-weight-asian="normal" style:font-size-complex="12pt" style:font-weight-complex="normal"/>
    </style:style>
    <style:style style:name="T30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officeooo:rsid="0030b2e1"/>
    </style:style>
    <style:style style:name="T32" style:family="text">
      <style:text-properties fo:color="#333333" loext:opacity="100%" fo:font-weight="bold" officeooo:rsid="001a9678" style:font-size-asian="8.75pt" style:font-weight-asian="bold" style:font-weight-complex="bold"/>
    </style:style>
    <style:style style:name="T33" style:family="text">
      <style:text-properties officeooo:rsid="0024b356"/>
    </style:style>
    <style:style style:name="T34" style:family="text">
      <style:text-properties style:font-size-asian="8.75pt"/>
    </style:style>
    <style:style style:name="T35" style:family="text">
      <style:text-properties officeooo:rsid="000dc4c7" style:font-size-asian="8.75pt"/>
    </style:style>
    <style:style style:name="T36" style:family="text">
      <style:text-properties fo:color="#333333" loext:opacity="100%" fo:font-weight="bold" officeooo:rsid="000dc4c7" style:font-size-asian="8.75pt" style:font-weight-asian="bold" style:font-weight-complex="bold"/>
    </style:style>
    <style:style style:name="T37" style:family="text">
      <style:text-properties officeooo:rsid="0038f7fc"/>
    </style:style>
    <style:style style:name="T38" style:family="text">
      <style:text-properties officeooo:rsid="001a9678" style:font-size-asian="8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EKSANDR BURLACHENKO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Email: <text:a xlink:type="simple" xlink:href="mailto:ialexbur@gmail.com" text:style-name="Internet_20_link" text:visited-style-name="Visited_20_Internet_20_Link">ialexbur@gmail.com</text:a></text:p>
          </table:table-cell>
          <table:table-cell table:style-name="Table1.A1" office:value-type="string">
            <text:p text:style-name="P3">Website: <text:a xlink:type="simple" xlink:href="https://buralex.github.io/" text:style-name="Internet_20_link" text:visited-style-name="Visited_20_Internet_20_Link">buralex.github.io</text:a></text:p>
          </table:table-cell>
          <table:table-cell table:style-name="Table1.A1" office:value-type="string">
            <text:p text:style-name="P3">LinkedIn: <text:a xlink:type="simple" xlink:href="https://www.linkedin.com/in/buralex" text:style-name="Internet_20_link" text:visited-style-name="Visited_20_Internet_20_Link">linkedin.com/in/buralex</text:a></text:p>
          </table:table-cell>
        </table:table-row>
      </table:table>
      <text:p text:style-name="P4">SUMMARY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Software Engineer with 5+ years of experience building scalable web applications from the ground up. Specialized in Node.js and React, with a proven track record delivering solutions across transportation, automotive, and travel domains. Experienced in the full software development lifecycle - from requirements gathering and system design to development, testing, and maintenance. Strong collaborator in distributed, multicultural teams, focused on delivering high-quality, user-centric products.</text:p>
          </table:table-cell>
        </table:table-row>
      </table:table>
      <text:p text:style-name="P6">TECHNOLOGIES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1">Frontend</text:span>: HTML, CSS (SCSS), <text:span text:style-name="T2">Tailwing CSS</text:span>, Javascript, Typescript, React, Redux, Jotai, websockets, <text:span text:style-name="T2">Google Maps Javascript API</text:span>.</text:p>
            <text:p text:style-name="P8"><text:span text:style-name="T1">Backend</text:span>: Node.js, Express, NestJS, MySQL, PostgreSQL, MongoDB, <text:span text:style-name="T3">Redis, </text:span><text:span text:style-name="T4">RabbitMQ,</text:span> Microservices, REST, <text:span text:style-name="T2">AWS Lambda, Amazon S3</text:span>.</text:p>
            <text:p text:style-name="P9"><text:span text:style-name="T5">Testing</text:span><text:span text:style-name="T6">: Jest, </text:span><text:span text:style-name="T7">React Testing Library,</text:span><text:span text:style-name="T6"> Puppeteer, CodeceptJS.</text:span></text:p>
            <text:p text:style-name="P9"><text:span text:style-name="T5">Deployment</text:span><text:span text:style-name="T6">: </text:span><text:span text:style-name="T8">VPS (</text:span><text:span text:style-name="T6">DigitalOcean </text:span><text:span text:style-name="T8">droplet or AWS ec2), </text:span><text:span text:style-name="T7">D</text:span><text:span text:style-name="T8">ocker, </text:span><text:span text:style-name="T7">N</text:span><text:span text:style-name="T8">ginx.</text:span></text:p>
          </table:table-cell>
        </table:table-row>
      </table:table>
      <text:p text:style-name="P10">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EPAM Systems</text:p>
            <text:p text:style-name="P12">Senior Software Engineer</text:p>
          </table:table-cell>
          <table:table-cell table:style-name="Table2.A1" office:value-type="string">
            <text:p text:style-name="P13">October 2021 – now <text:span text:style-name="T9">(</text:span><text:span text:style-name="T10">4</text:span><text:span text:style-name="T11">+</text:span><text:span text:style-name="T9"> yrs)</text:span></text:p>
          </table:table-cell>
        </table:table-row>
        <table:table-row table:style-name="Table2.2">
          <table:table-cell table:style-name="Table2.A2" table:number-columns-spanned="2" office:value-type="string">
            <text:p text:style-name="P14"><text:span text:style-name="T12">Project</text:span>: <text:span text:style-name="T13">Platform</text:span><text:span text:style-name="T14"> for booking and reviewing restaurants</text:span><text:span text:style-name="T15">.</text:span></text:p>
            <text:p text:style-name="P15"><text:span text:style-name="T16">R</text:span><text:span text:style-name="T17">esponsibilities</text:span><text:span text:style-name="T1">: </text:span><text:span text:style-name="T18">Built a URL shortener microservice from scratch using </text:span><text:span text:style-name="T19">Node.js</text:span><text:span text:style-name="T18"> and PostgreSQL</text:span><text:span text:style-name="T20">. <text:s/></text:span><text:span text:style-name="T18">Maintained and updated frontend pages using React. Participated in migrating loyalty points functionality from monolithic architecture to microservices and external service integrations.</text:span></text:p>
            <text:p text:style-name="P16">---</text:p>
            <text:p text:style-name="P17"><text:span text:style-name="T12">Project</text:span>: <text:span text:style-name="T14">Sales Assistant </text:span><text:span text:style-name="T21">platform</text:span><text:span text:style-name="T14"> for Insurance Agents</text:span><text:span text:style-name="T15">.</text:span></text:p>
            <text:p text:style-name="P18"><text:span text:style-name="T16">R</text:span><text:span text:style-name="T17">esponsibilities</text:span><text:span text:style-name="T1">: </text:span><text:span text:style-name="T20">Contributed to the design and development of a microservice for managing user credit points, enabling account top-ups, balance tracking, and transaction logging </text:span><text:span text:style-name="T22">using DynamoDB and NestJS</text:span><text:span text:style-name="T20">. </text:span><text:span text:style-name="T23">Developed CSV export functionality to enable data sharing across systems.</text:span></text:p>
            <text:p text:style-name="P18">---</text:p>
            <text:p text:style-name="P17"><text:span text:style-name="T12">Project</text:span>: <text:span text:style-name="T14">Banking app</text:span><text:span text:style-name="T15">.</text:span></text:p>
            <text:p text:style-name="P18"><text:span text:style-name="T16">R</text:span><text:span text:style-name="T17">esponsibilities</text:span><text:span text:style-name="T1">: </text:span><text:span text:style-name="T24">Refactored and developed backend REST API endpoints using Express and PostgreSQL</text:span>. <text:span text:style-name="T18">Implemented various long-running background jobs </text:span><text:span text:style-name="T25">(using Bull library)</text:span><text:span text:style-name="T18">, including database backfilling and </text:span><text:span text:style-name="T25">sending emails</text:span><text:span text:style-name="T18">.</text:span></text:p>
            <text:p text:style-name="P15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Luxoft</text:p>
            <text:p text:style-name="P20"><text:span text:style-name="T26">Senior Software Engineer</text:span></text:p>
          </table:table-cell>
          <table:table-cell table:style-name="Table3.A1" office:value-type="string">
            <text:p text:style-name="P21">February 2020 – October 2021 <text:span text:style-name="T9">(1 yrs 9 mos)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22"><text:span text:style-name="T12">Project</text:span>: <text:span text:style-name="T15">Automotive in-vehicle infotainment.</text:span></text:p>
            <text:p text:style-name="P23"><text:span text:style-name="T16">R</text:span><text:span text:style-name="T17">esponsibilities</text:span><text:span text:style-name="T1">: </text:span><text:span text:style-name="T25">Develop frontend part of human machine interfaces (central display of the car infotainment system) using React</text:span><text:span text:style-name="T18">.</text:span></text:p>
            <text:p text:style-name="P24"/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Brightech</text:p>
            <text:p text:style-name="P26">Full Stack <text:span text:style-name="T26">Software</text:span> Developer</text:p>
          </table:table-cell>
          <table:table-cell table:style-name="Table4.A1" office:value-type="string">
            <text:p text:style-name="P21">July 2017 – February 2020 <text:span text:style-name="T9">(2 yrs 8 mos)</text:span></text:p>
          </table:table-cell>
        </table:table-row>
        <table:table-row>
          <table:table-cell table:style-name="Table4.A2" table:number-columns-spanned="2" office:value-type="string">
            <text:p text:style-name="P27"><text:span text:style-name="T12">Project</text:span>: <text:span text:style-name="T15">Transportation management system.</text:span></text:p>
            <text:p text:style-name="P24"><text:span text:style-name="T16">R</text:span><text:span text:style-name="T17">esponsibilities</text:span><text:span text:style-name="T1">: </text:span>Develop realtime chat microservice using <text:span text:style-name="T27">E</text:span>xpress and Mongodb. Develop new <text:span text:style-name="T27">frontend </text:span>pages with dynamic forms and real-time lists using React and Redux. Implement websocket communication between Express server and React app using Socket.io library. Implement “End to End” tests using <text:span text:style-name="T28">CodeceptJS. </text:span>Added dynamic Google Map to display truck fleet in real time.</text:p>
          </table:table-cell>
          <table:covered-table-cell/>
        </table:table-row>
      </table:table>
      <text:p text:style-name="P28"><text:span text:style-name="T29">E</text:span><text:span text:style-name="T30">DUCATION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9">Master’s in Mechanical Engineering, Admiral Makarov National University of Shipbuilding.</text:p>
          </table:table-cell>
        </table:table-row>
      </table:table>
      <text:p text:style-name="P30">LANGUAGE<text:span text:style-name="T31">S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1"><text:span text:style-name="T32">English</text:span>: <text:span text:style-name="T33">Upper-I</text:span><text:span text:style-name="T34">ntermediate </text:span><text:span text:style-name="T35">(B2), </text:span><text:span text:style-name="T36">Russian</text:span>: <text:span text:style-name="T37">N</text:span><text:span text:style-name="T38">ative</text:span></text:p>
          </table:table-cell>
        </table:table-row>
      </table:table>
      <text:p text:style-name="P32"><text:span text:style-name="T38"/>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9:06:12.040986397</meta:creation-date>
    <dc:date>2026-05-24T23:40:34.350732000</dc:date>
    <meta:editing-duration>PT2H50M55S</meta:editing-duration>
    <meta:editing-cycles>47</meta:editing-cycles>
    <meta:generator>LibreOffice/26.2.2.2$MacOSX_AARCH64 LibreOffice_project/1f77d10d6938fd34972958f64b2bcfa54f8b1ba5</meta:generator>
    <meta:document-statistic meta:table-count="8" meta:image-count="0" meta:object-count="0" meta:page-count="1" meta:paragraph-count="37" meta:word-count="368" meta:character-count="2882" meta:non-whitespace-character-count="2547"/>
  </office:meta>
</office:document-meta>
</file>